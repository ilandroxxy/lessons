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4;5;7;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;5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3;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2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0;1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1;15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4;1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ASUS</dc:creator>
    <meta:creation-date>2022-07-26T06:42:39Z</meta:creation-date>
    <dc:date>2026-04-23T18:13:58Z</dc:date>
  </office:meta>
</office:document-meta>
</file>